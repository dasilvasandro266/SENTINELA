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ubtitle">
      <style:text-properties fo:font-weight="bold" style:font-weight-asian="bold" style:font-weight-complex="bold"/>
    </style:style>
    <style:style style:name="P2" style:family="paragraph" style:parent-style-name="Heading_20_1" style:list-style-name="WWNum36">
      <style:paragraph-properties fo:margin-top="0.499cm" fo:margin-bottom="0cm" style:contextual-spacing="false" fo:line-height="100%" fo:text-align="justify" style:justify-single-word="false" fo:text-indent="1.499cm" style:auto-text-indent="false"/>
      <style:text-properties officeooo:paragraph-rsid="0004e808"/>
    </style:style>
    <style:style style:name="P3" style:family="paragraph" style:parent-style-name="Standard">
      <style:paragraph-properties fo:margin-top="0.499cm" fo:margin-bottom="0cm" style:contextual-spacing="false" fo:line-height="100%" fo:text-align="justify" style:justify-single-word="false" fo:text-indent="1.499cm" style:auto-text-indent="false"/>
      <style:text-properties officeooo:paragraph-rsid="0004e808" style:font-name-complex="Times New Roman"/>
    </style:style>
    <style:style style:name="P4" style:family="paragraph" style:parent-style-name="Standard">
      <style:paragraph-properties fo:margin-top="0.499cm" fo:margin-bottom="0cm" style:contextual-spacing="false" fo:line-height="100%" fo:text-align="justify" style:justify-single-word="false" fo:text-indent="1.499cm" style:auto-text-indent="false"/>
      <style:text-properties officeooo:paragraph-rsid="0004e808"/>
    </style:style>
    <style:style style:name="T1" style:family="text">
      <style:text-properties style:font-name-complex="Times New Roman"/>
    </style:style>
    <style:style style:name="T2" style:family="text">
      <style:text-properties officeooo:rsid="0004e808" style:font-name-complex="Times New Roman"/>
    </style:style>
    <style:style style:name="T3" style:family="text">
      <style:text-properties officeooo:rsid="000552dc" style:font-name-complex="Times New Roman"/>
    </style:style>
    <style:style style:name="T4" style:family="text">
      <style:text-properties fo:font-weight="bold" style:font-weight-asian="bold" style:font-name-complex="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Evolução Histórica</text:p>
      <text:p text:style-name="P4" loext:marker-style-name="T1"><text:span text:style-name="T1">O termo processo, que constitui o ponto fulcral da designação deste ramo de direito público instrumental, reveste nas expressões processo civil e direito processual civil um sentido inteiramente condizente com a sua origem etimológica.</text:span></text:p>
      <text:p text:style-name="P4" loext:marker-style-name="T1"><text:span text:style-name="T1">A palavra processo compõe-se, na sua formação etimológica, dos vocábulos cedere + pro, e significa caminhar para a frente, avançar para um obje</text:span><text:span text:style-name="T2">c</text:span><text:span text:style-name="T1">tivo.</text:span></text:p>
      <text:p text:style-name="P4" loext:marker-style-name="T1"><text:span text:style-name="T1">Nesse sentido se fala do processo químico (de certo elemento), do processo de fabrico (de um produto), do processo de cura (de uma doença), do processo de admissão (a uma escola).</text:span></text:p>
      <text:p text:style-name="P4" loext:marker-style-name="T1"><text:span text:style-name="T1">Trata-se, em qualquer dos casos, de uma sequência de actos, logicamente articulados entre si, com vista a determinado fim.</text:span></text:p>
      <text:p text:style-name="P4" loext:marker-style-name="T1"><text:span text:style-name="T1">O direito processual civil abrange, com efeito, a disciplina normativa de uma série de actos, logicamente encadeados entre si, com vista à obtenção da providência judiciária requerida pelo autor.</text:span></text:p>
      <text:p text:style-name="P4" loext:marker-style-name="T1"><text:span text:style-name="T1">Nem sempre, porém, a expressão processo é usada na linguagem corrente com a mesma acepção. Durante muito tempo, enquanto o direito adjectivo se não autonomizou da sua matriz substantiva, o termo (processo) foi empregue para referir apenas o conjunto de actos a praticar em juízo para a obtenção de certa providência.</text:span></text:p>
      <text:p text:style-name="P4" loext:marker-style-name="T1"><text:span text:style-name="T1">O processo abrangia assim os </text:span><text:span text:style-name="T4">actos</text:span><text:span text:style-name="T1">, a sua </text:span><text:span text:style-name="T4">forma</text:span><text:span text:style-name="T1">, a sua </text:span><text:span text:style-name="T4">sequência cronológica</text:span><text:span text:style-name="T1">; mas não as </text:span><text:span text:style-name="T4">normas definidoras da sua regulamentação</text:span><text:span text:style-name="T1">, nem a disciplina que, com método *cientifico*, se ocupa da articulação e sistematização destas regras.</text:span></text:p>
      <text:p text:style-name="P4" loext:marker-style-name="T1"><text:span text:style-name="T1">Não compreendia os pressupostos processuais, limitando-se aos </text:span><text:span text:style-name="T4">actos ou diligências das partes</text:span><text:span text:style-name="T1">, </text:span><text:span text:style-name="T4">do tribunal ou dos auxiliares processuais</text:span><text:span text:style-name="T1">, ou seja, ao formalismo processual, à liturgia ou rito do processo.</text:span></text:p>
      <text:p text:style-name="P4" loext:marker-style-name="T1"><text:span text:style-name="T1">Num outro sentido, mais concreto e ainda mais limitado, usa-se o termo processo como sinónimo de causa, litígio, pleito ou </text:span><text:span text:style-name="T4">demanda</text:span><text:span text:style-name="T1">, para significar a situação concreta resultante da pretensão deduzida em juízo por determinada pessoa contra uma outra.</text:span></text:p>
      <text:p text:style-name="P4" loext:marker-style-name="T1"><text:span text:style-name="T1">Nesse sentido se diz correntemente que um advogado tem vários </text:span><text:span text:style-name="T4">processos</text:span><text:span text:style-name="T1"> a correr na comarca de </text:span><text:span text:style-name="T3">Belas</text:span><text:span text:style-name="T1"> ou que o Banco </text:span><text:span text:style-name="T3">X</text:span><text:span text:style-name="T1"> ingressou em juízo com um processo contra determinado cliente.</text:span></text:p>
      <text:p text:style-name="P4" loext:marker-style-name="T1"><text:span text:style-name="T1">Numa última acepção, mais materialista do que a anterior, se identifica o processo com os </text:span><text:span text:style-name="T4">autos da acção</text:span><text:span text:style-name="T1">, formados pelas </text:span><text:span text:style-name="T4">peças escritas emanadas das partes</text:span><text:span text:style-name="T1">, pelos </text:span><text:span text:style-name="T4">documentos juntos</text:span><text:span text:style-name="T1">, pelas </text:span><text:span text:style-name="T4">decisões do tribunal</text:span><text:span text:style-name="T1"> e pelos </text:span><text:span text:style-name="T4">termos dos actos e diligências praticadas no decurso da acção</text:span><text:span text:style-name="T1">.</text:span></text:p>
      <text:p text:style-name="P4" loext:marker-style-name="T1"><text:span text:style-name="T1">Neste sentido se diz, correntemente, que o advogado </text:span><text:span text:style-name="T4">levou o processo para casa</text:span><text:span text:style-name="T1">, que o processo se encontra com o juiz ou que determinado processo foi apensado a um outro.</text:span></text:p>
      <text:p text:style-name="P4" loext:marker-style-name="T1"/>
      <text:p text:style-name="P3" loext:marker-style-name="T1"><text:soft-page-break/></text:p>
      <text:p text:style-name="P1">2. Fontes do direito processual civil</text:p>
      <text:p text:style-name="P4" loext:marker-style-name="T1"><text:span text:style-name="T1">Cabendo ao direito adjectivo a regulamentação dos meios pelos quais se determina, em face dos factos apurados e à luz do direito material aplicável, a procedência da pretensão deduzida pelo autor e se realiza coactivamente a reintegração do direito subjectivo violado, a má condução do processo, seja por ignorância, seja por defeituosa aplicação dos seus preceitos, não pode deixar de ter reflexos negativos na decisão da causa.</text:span></text:p>
      <text:p text:style-name="P4" loext:marker-style-name="T1"><text:span text:style-name="T1">Durante muito tempo, mesmo na vigência do primeiro Código de Processo (de 1876) </text:span><text:span text:style-name="T3">em solo português</text:span><text:span text:style-name="T1">, até à publicação do famoso </text:span><text:span text:style-name="T4">Decreto n.º 12 353, de 22 de Setembro de 1926</text:span><text:span text:style-name="T1">, o formalismo dos actos judiciais teve uma importância excessiva no resultado das acções, especialmente devido ao regime radical estabelecido para as chamadas nulidades insupríveis.</text:span></text:p>
      <text:p text:style-name="P4" loext:marker-style-name="T1"><text:span text:style-name="T1">Este empolamento do rito processual dava inúmeras vezes como resultado a perda da acção, e não raro a perda definitiva do direito litigado, para a parte que deveria vencer, perante o direito material aplicável.</text:span></text:p>
      <text:p text:style-name="P4" loext:marker-style-name="T1"><text:span text:style-name="T1">A reforma do processo civil, iniciada com aquele diploma de 1926, procurou assegurar, na medida do possível, o triunfo da justiça material, assente na correcta interpretação e aplicação do direito substantivo, sobre a pura justiça formal, resultante da mais hábil manipulação dos instrumentos de carácter processual.</text:span></text:p>
      <text:p text:style-name="P4" loext:marker-style-name="T1"><text:span text:style-name="T1">Assim se atenuou o risco das decisões desfavoráveis, por deficiente aplicação do processo; mas esse risco não foi, nem alguma vez poderá ser, totalmente eliminado. Basta referir, a título de exemplo, os prazos estabelecidos para a realização de certos actos e alguns dos ônus lançados sobre as partes na elaboração dos articulados.</text:span></text:p>
      <text:p text:style-name="P4" loext:marker-style-name="T1"><text:span text:style-name="T1">Se o réu, devidamente citado na sua pessoa, não contestar dentro do prazo fixado para o efeito (art. 486.º, 1) tem a lei por confessados os factos articulados pelo autor (art. 484.º, 1).</text:span></text:p>
      <text:p text:style-name="P4" loext:marker-style-name="T1"><text:span text:style-name="T1">Se a parte vencida na sentença final, tendo fundamentos para impugnar a decisão, dela não interpuser recurso dentro do prazo legalmente estabelecido para o efeito (art. 685.º, 1) a sentença transitará em julgado e converter-se-á em decisão definitiva (art. 677.º).</text:span></text:p>
      <text:p text:style-name="P4" loext:marker-style-name="T1"><text:span text:style-name="T1">E qualquer destas consequências pode implicar a perda definitiva do direito subjecitvo para quem o poderia ter eficazmente defendido, numa correcta aplicação do direito substantivo.</text:span></text:p>
      <text:p text:style-name="P4" loext:marker-style-name="T1"><text:span text:style-name="T1">Mas a importância prática do processo estende-se a muitos outros aspectos.</text:span></text:p>
      <text:p text:style-name="P4" loext:marker-style-name="T1"><text:span text:style-name="T1">Um deles respeita aos actos e incidentes desnecessários à declaração ou defesa do direito (actos e incidentes supérfluos), cujas custas recaem, não sobre a parte vencida, mas sobre aquela que (escusadamente) os requereu (art. 448.°, 1).</text:span></text:p>
      <text:p text:style-name="P4" loext:marker-style-name="T1"><text:span text:style-name="T1">Outro é o que resulta dos limites objectivos rigidamente impostos à sentença de condenação.</text:span></text:p>
      <text:p text:style-name="P4" loext:marker-style-name="T1"><text:span text:style-name="T1">“A sentença, prescreve o artigo 661.°, 1, não pode condenar em quantidade superior ou em objecto diverso do que se pedir.”</text:span></text:p>
      <text:p text:style-name="P4" loext:marker-style-name="T1"><text:soft-page-break/><text:span text:style-name="T1">Assim, se o autor tiver direito a 15, mas pedir apenas 10, a sentença final não poderá condenar o réu em mais de 10 </text:span><text:span text:style-name="T4">(ne eat index ultra petita)</text:span><text:span text:style-name="T1">, mesmo que os factos provados demonstrem que ele teria direito a 15.</text:span></text:p>
      <text:list text:style-name="WWNum36">
        <text:list-item>
          <text:h text:style-name="P2" text:outline-level="1"><text:bookmark-start text:name="_Toc219477780"/>Interesse teórico da relação processual.<text:bookmark-end text:name="_Toc219477780"/></text:h>
        </text:list-item>
      </text:list>
      <text:p text:style-name="P3" loext:marker-style-name="T1"/>
      <text:p text:style-name="P4" loext:marker-style-name="T1"><text:span text:style-name="T1">É também digno de realce o interesse que a relação processual civil reveste para o conhecimento teórico do direito.</text:span></text:p>
      <text:p text:style-name="P4" loext:marker-style-name="T1"><text:span text:style-name="T1">Foi a partir de meados do século fundo, com os estudos do processualista alemão von Bülow, que a contribuição específica do direito processual para os estudos da ciência jurídica foi devidamente reconhecida.</text:span></text:p>
      <text:p text:style-name="P4" loext:marker-style-name="T1"><text:span text:style-name="T1">Até então, a generalidade dos autores, considerando o processo rigorosamente limitado aos actos a praticar na propositura e desenvolvimento da acção, entendia que a matéria do rito processual, assente sobre puras razões formais de exequibilidade, interessava apenas aos práticos do direito, aos homens do foro.</text:span></text:p>
      <text:p text:style-name="P4" loext:marker-style-name="T1"><text:span text:style-name="T1">Para essa posição subalterna do processo concórdia <text:s/>outrossim, em larga medida, a convicção generalizada de que o poder de agir em juízo para realizar ou assegurar cada direito subjectivo cabia ainda no âmbito do direito civil, ao definir os poderes dos titulares da respectiva relação jurídica.</text:span></text:p>
      <text:p text:style-name="P4" loext:marker-style-name="T1"><text:span text:style-name="T1">A justa caracterização da relação processual, estabelecida entre as partes e o Estado (do processo ou iudicium, como relação essencialmente distinta da res in iudicium deducta), bem como a rigorosa definição do direito de acção, a breve trecho garantiram, porém, a plena autonomização do processo no campo da ciência jurídica.</text:span></text:p>
      <text:p text:style-name="P4" loext:marker-style-name="T1"><text:span text:style-name="T1">As situações processuais são em regra mais simples, mais esquemáticas e mais limitadas no tempo do que o comum das relações compreendidas no direito civil. Mas não faltam, na área do processo, situações de real complexidade na sua estrutura, como as resultantes dos incidentes da intervenção de terceiros. E não são poucos os temas processuais que, pela profundidade dos seus reflexos, como o da legitimidade, das excepções, do caso julgado, da venda judicial, dos poderes de cognição do juiz, dos negócios processuais ou da destrinça entre questões de facto e questões de direito, igualam em dificuldade algumas das questões mais graves do direito privado.</text:span></text:p>
      <text:p text:style-name="P4" loext:marker-style-name="T1"><text:span text:style-name="T1">E uma outra circunstância especial reforça o interesse do estudo doutrinário do processo civil.</text:span></text:p>
      <text:p text:style-name="P4" loext:marker-style-name="T1"><text:span text:style-name="T1">É que, sendo a coercibilidade o traço característico do direito em face dos restantes complexos normativos reguladores da vida social, o processo permite conhecer, como nenhum outro ramo do direito, pela função característica das suas normas, os múltiplos aspectos em que se desdobra esse momento culminante das relações jurídicas privadas.</text:span></text:p>
      <text:p text:style-name="P4" loext:marker-style-name="T1"><text:span text:style-name="T1">Em nenhum outro sector da realidade jurídica se reflecte melhor do que no processo civil o traço fundamental de distinção que separa o direito da moral, da religião ou da mera cortesi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font-size="16pt" fo:font-weight="bold" style:font-name-asian="F" style:font-family-generic-asian="system" style:font-pitch-asian="variable" style:font-size-asian="16pt" style:font-weight-asian="bold" style:font-name-complex="F"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499cm" fo:margin-bottom="0cm" style:contextual-spacing="false" fo:line-height="100%" fo:text-align="justify" style:justify-single-word="false" fo:text-indent="1.499cm" style:auto-text-indent="false"/>
      <style:text-properties fo:font-size="18pt" officeooo:rsid="0004e808" style:font-size-asian="18pt" style:font-size-complex="18pt"/>
    </style:style>
    <style:style style:name="ListLabel_20_316" style:display-name="ListLabel 316" style:family="text">
      <style:text-properties fo:font-size="16pt" style:font-size-asian="16pt"/>
    </style:style>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7T16:20:53.904076797</meta:creation-date>
    <dc:date>2026-03-17T16:44:58.211276268</dc:date>
    <meta:editing-duration>PT2M10S</meta:editing-duration>
    <meta:editing-cycles>1</meta:editing-cycles>
    <meta:generator>LibreOffice/24.2.7.2$Linux_X86_64 LibreOffice_project/420$Build-2</meta:generator>
    <meta:document-statistic meta:table-count="0" meta:image-count="0" meta:object-count="0" meta:page-count="3" meta:paragraph-count="37" meta:word-count="1277" meta:character-count="8147" meta:non-whitespace-character-count="6907"/>
  </office:meta>
</office:document-meta>
</file>
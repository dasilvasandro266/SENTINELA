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Quotations">
      <style:paragraph-properties fo:text-align="center" style:justify-single-word="false"/>
    </style:style>
    <style:style style:name="P2" style:family="paragraph" style:parent-style-name="Quotation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.7cm" fo:margin-bottom="0cm" style:contextual-spacing="false" fo:text-align="justify" style:justify-single-word="false" fo:text-indent="2cm" style:auto-text-indent="false"/>
      <style:text-properties officeooo:paragraph-rsid="0010a88e"/>
    </style:style>
    <style:style style:name="P4" style:family="paragraph" style:parent-style-name="Standard">
      <style:paragraph-properties fo:margin-top="0.7cm" fo:margin-bottom="0cm" style:contextual-spacing="false" fo:text-align="center" style:justify-single-word="false" fo:text-indent="0cm" style:auto-text-indent="false"/>
      <style:text-properties officeooo:paragraph-rsid="0010a88e"/>
    </style:style>
    <style:style style:name="P5" style:family="paragraph" style:parent-style-name="Standard">
      <style:paragraph-properties fo:margin-left="0cm" fo:margin-top="0.7cm" fo:margin-bottom="0cm" style:contextual-spacing="false" fo:text-align="center" style:justify-single-word="false" fo:text-indent="0cm" style:auto-text-indent="false"/>
      <style:text-properties officeooo:paragraph-rsid="0010a88e"/>
    </style:style>
    <style:style style:name="T1" style:family="text">
      <style:text-properties style:font-name-complex="Times New Roman"/>
    </style:style>
    <style:style style:name="T2" style:family="text">
      <style:text-properties officeooo:rsid="0010a88e" style:font-name-complex="Times New Roman"/>
    </style:style>
    <style:style style:name="T3" style:family="text">
      <style:text-properties officeooo:rsid="00113711" style:font-name-complex="Times New Roman"/>
    </style:style>
    <style:style style:name="T4" style:family="text">
      <style:text-properties fo:font-weight="bold" style:font-weight-asian="bold"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>O direito processual civil, correntemente designado por processo civil, é o ramo do direito público destinado a integrar o direito civil.</text:span></text:p>
      <text:p text:style-name="P3" loext:marker-style-name="T1"><text:span text:style-name="T1">O direito civil abarca todo o conjunto de normas reguladoras das relações jurídicas estabelecidas entre particulares, ou entre particulares e os entes públicos (incluindo o Estado), desde que estes não exerçam na relação uma função de soberania.</text:span></text:p>
      <text:p text:style-name="P3" loext:marker-style-name="T1"><text:span text:style-name="T1">A regulamentação das relações compreendidas no foro do direito privado traduz-se, em regra, na atribuição de um ou mais direitos subjetivos a uma das partes e na consequente imposição do dever jurídico correlativo à outra parte.</text:span></text:p>
      <text:p text:style-name="P3" loext:marker-style-name="T1"><text:span text:style-name="T1">Assim sucede nas relações obrigacionais (simples ou complexas) derivadas dos diferentes contractos, negócios unilaterais, situações de enriquecimento injustificado ou factos ilícitos, bem como também nos direitos reais e nos direitos de personalidade, em que o poder de fruir ou dispor de determinados bens é atribuído exclusivamente ao respetivo titular, correspondendo um dever geral de abstenção difusamente imposto a todas as outras pessoas. Por exemplo, o direito de usufruir de um veículo pertence inteiramente ao seu proprietário e só, a todas as outras pessoas é negado o direito de gozar do automóvel, salvo explícita deliberação do proprietário.</text:span></text:p>
      <text:p text:style-name="P3" loext:marker-style-name="T1"><text:span text:style-name="T1">Os indivíduos a quem recaem obrigações jurídicas correspondentes ao direito subjetivo de outrem, devem por regra obedecer ao comportamento que a ordem jurídica estabelece, como por exemplo, o cumprimento da prestação devida ou a não fruição de bens que não lhes pertencem.</text:span></text:p>
      <text:p text:style-name="P3" loext:marker-style-name="T1"><text:span text:style-name="T1">Quando assim não suceda devido ao incumprimento das respetivas obrigações por qualquer das partes, o direito civil não soluciona o conflito real ou específico suscitado entre o lesado e o lesante, </text:span><text:span text:style-name="T2">p</text:span><text:span text:style-name="T1">elas características das suas próprias normas, move-se no plano da generalidade e da abstração, se não adaptarem à reintegração de situações concretas em crise.</text:span></text:p>
      <text:p text:style-name="P3" loext:marker-style-name="T1"><text:span text:style-name="T1">Se não ao direito civil, regulador das relações entre os particulares, </text:span><text:span text:style-name="T2">a</text:span><text:span text:style-name="T1"> quem incube sanar tal conflito?</text:span></text:p>
      <text:p text:style-name="P3" loext:marker-style-name="T1"><text:span text:style-name="T1">A primeira via para remediar tais situações de crise será a de facultar ao sujeito lesado o recurso à própria força, a fim de, por si mesmo, repor a solução que decorre do direito substantivo aplicável.</text:span></text:p>
      <text:p text:style-name="P3" loext:marker-style-name="T1"><text:span text:style-name="T1">Este sistema da justiça privada, assente no princípio fundamental da autodefesa e da ação direta (haja ainda em vista o direito de retenção, a faculdade de compensação e, no sector do trabalho, o direito à greve), foi largamente praticado nas sociedades primitivas.</text:span></text:p>
      <text:p text:style-name="P3" loext:marker-style-name="T1"><text:span text:style-name="T1">Trata-se, porém, de um sistema imperfeito, manifestamente inadequado às exigências de uma comunidade civilizada, por uma dupla razão.</text:span></text:p>
      <text:p text:style-name="P3" loext:marker-style-name="T1"><text:span text:style-name="T1">Primeiro, como a força nem sempre se encontra com quem tem a razão (e a lei) ao seu lado, a justiça privada claudicaria em muitas situações de violação do direito.</text:span></text:p>
      <text:p text:style-name="P3" loext:marker-style-name="T1"><text:soft-page-break/><text:span text:style-name="T1">Segundo, como a própria parte queixosa, mesmo que munida da força necessária, não é a entidade mentalmente mais indicada para definir os poderes próprios e os deveres alheios, nem para fixar os termos da reparação devida a seus direitos, o sistema da justiça privada levaria inevitavelmente a excessos e injustiças que, em lugar da paz social e da reposição da ordem jurídica violada, só multiplicariam e agravariam os conflitos entre os particulares.</text:span></text:p>
      <text:p text:style-name="P3" loext:marker-style-name="T1"><text:span text:style-name="T1">Por isso, o artigo 1.º do Código de Processo Civil, à semelhança do que fazem os diplomas congéneres dos outros países, condena expressamente o sistema da justiça privada, afirmando que </text:span><text:span text:style-name="T4">“a ninguém é lícito o recurso à força com o fim de realizar ou assegurar o próprio direito, salvo nos casos e dentro dos limites declarados na lei”</text:span><text:span text:style-name="T1">.</text:span></text:p>
      <text:p text:style-name="P3" loext:marker-style-name="T1"><text:span text:style-name="T1">Vedando aos particulares o recurso à (própria) força, o Estado obriga-se naturalmente, através dos tribunais, a conceder a todo o titular do direito violado a providência necessária à reintegração efectiva desse direito.</text:span></text:p>
      <text:p text:style-name="P3" loext:marker-style-name="T1"><text:span text:style-name="T1">Esclarece o artigo 2.° do Código de Processo Civil:</text:span></text:p>
      <text:p text:style-name="P4" loext:marker-style-name="T4"><text:span text:style-name="T4">Correspondência entre o direito e a ação</text:span></text:p>
      <text:p text:style-name="P1"><text:span text:style-name="T4">“</text:span><text:span text:style-name="T1">A todo o direito, exceto quando a lei determine o contrário, corresponde uma ação, destinada a fazê-lo reconhecer em juízo ou a realizá-lo coercivamente, bem como as providências necessárias para acautelar o efeito útil da ação</text:span><text:span text:style-name="T4">”</text:span></text:p>
      <text:p text:style-name="P3" loext:marker-style-name="T1"><text:span text:style-name="T1">A este sistema, oposto ao da justiça privada, em que o Estado chama exclusivamente a si, através dos órgãos jurisdicionais, o poder de reconhecer vinculativamente os direitos controvertidos entre os particulares e de coercivamente os realizar, dá a doutrina o nome de sistema da justiça pública, pois, não são mais os particulares, mas o Estado, mediante os órgãos judiciais próprios, quem define e executa os direitos dos litigantes no caso de conflito.</text:span></text:p>
      <text:p text:style-name="P3" loext:marker-style-name="T1"><text:span text:style-name="T1">A expressão não significa que sejam os tribunais quem, nos casos de conflito entre os particulares, promove oficiosamente a instauração da ação tendente à reparação do direito violado, pelo contrário. Dentro da área das relações abrangidas pelo direito civil, nas quais não estão diretamente envolvidos interesses ligados à soberania do Estado, é ao particular sujeito da relação que incumbe promover (e impulsionar) a ação destinada à obtenção da providência judiciária adequada.</text:span></text:p>
      <text:p text:style-name="P5" loext:marker-style-name="T4"><text:span text:style-name="T4">Código De Processo Civil <text:s/>- Art. 3.º, nº1</text:span></text:p>
      <text:p text:style-name="P2">Necessidade do pedido e da contradição</text:p>
      <text:p text:style-name="P1"><text:span text:style-name="T4">“</text:span><text:span text:style-name="T1">O tribunal não pode resolver o conflito de interesses que a ação pressupõe sem que a resolução lhe seja pedida por uma das partes e a outra seja devidamente chamada para deduzir oposição</text:span><text:span text:style-name="T4">”</text:span></text:p>
      <text:p text:style-name="P3" loext:marker-style-name="T1"><text:span text:style-name="T1">Para resolver o conflito de interesses, não basta naturalmente ao tribunal ouvir apenas as razões do queixoso. Terá também, como expressamente se prescreve no trecho restante do n.º 1 deste artigo 3.º, de conceder à parte contrária a faculdade de se defender </text:span><text:span text:style-name="T4">(audi alteram partem)</text:span><text:span text:style-name="T1">, deduzindo a sua oposição.</text:span></text:p>
      <text:p text:style-name="P3" loext:marker-style-name="T1"><text:soft-page-break/><text:span text:style-name="T1">Se ao lesado, impossibilitado de reintegrar a ordem jurídica por suas próprias mãos, cabe o direito de ação (contra o Estado e o lesante), ao demandado, que pode não ter cometido a violação do direito que lhe é imputada, compete naturalmente o direito de contradição ou de defesa.</text:span></text:p>
      <text:p text:style-name="P3" loext:marker-style-name="T1"><text:span text:style-name="T1">Havendo, como geralmente acontece, desarmonia entre as razões do requerente e as considerações da parte adversa, tornar-se-á necessário recorrer as mais das vezes ao depoimento de testemunhas, à averiguação de peritos, à recolha de prova documental, à discussão da causa por peritos do direito, patronos das partes, para finalmente se apurarem os factos que interessam à decisão da causa e se conceder ou denegar a providência judiciária </text:span><text:span text:style-name="T3">que venha a ser </text:span><text:span text:style-name="T1">requerida.</text:span></text:p>
      <text:p text:style-name="P3" loext:marker-style-name="T1"><text:span text:style-name="T1">Todavia, nem as providências judiciárias capazes de sanarem os conflitos entre os particulares são arbitrariamente escolhidas pelas partes, nem os termos em que a ação é proposta e se desenvolve em juízo são casuística ou improvisadamente traçados pelo tribunal.</text:span></text:p>
      <text:p text:style-name="P3" loext:marker-style-name="T1"><text:span text:style-name="T1">Tanto a propositura da ação, como a atividade subsequente que as partes, o tribunal e os auxiliares processuais devem desenvolver em juízo, obedecem a regras normativas, cujo agregado constitui o direito processual civil.</text:span></text:p>
      <text:p text:style-name="P3" loext:marker-style-name="T1"><text:span text:style-name="T1">Este ramo do direito pode assim ser definido como o conjunto de normas reguladoras dos tipos, formas e requisitos da ação civil, bem como das formalidades que devem ser observadas em juízo na propositura e desenvolvimento dela.</text:span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1T16:23:16.029211817</meta:creation-date>
    <dc:date>2026-03-11T16:54:51.135937067</dc:date>
    <meta:editing-duration>PT2M51S</meta:editing-duration>
    <meta:editing-cycles>1</meta:editing-cycles>
    <meta:document-statistic meta:table-count="0" meta:image-count="0" meta:object-count="0" meta:page-count="3" meta:paragraph-count="28" meta:word-count="1112" meta:character-count="7049" meta:non-whitespace-character-count="5964"/>
    <meta:generator>LibreOffice/24.2.7.2$Linux_X86_64 LibreOffice_project/420$Build-2</meta:generator>
  </office:meta>
</office:document-meta>
</file>